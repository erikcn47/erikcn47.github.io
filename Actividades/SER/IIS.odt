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0DB8CFA08ED.png" manifest:media-type="image/png"/>
  <manifest:file-entry manifest:full-path="Pictures/1000000100000123000000239D2329B1.png" manifest:media-type="image/png"/>
  <manifest:file-entry manifest:full-path="Pictures/10000001000004BC000002834E1E4F1A.png" manifest:media-type="image/png"/>
  <manifest:file-entry manifest:full-path="Pictures/10000001000000D2000000230F492B40.png" manifest:media-type="image/png"/>
  <manifest:file-entry manifest:full-path="Pictures/1000000100000300000001B53A7F4EED.png" manifest:media-type="image/png"/>
  <manifest:file-entry manifest:full-path="Pictures/10000001000000B400000047E167C388.png" manifest:media-type="image/png"/>
  <manifest:file-entry manifest:full-path="Pictures/10000001000000DC0000003FF040F5D0.png" manifest:media-type="image/png"/>
  <manifest:file-entry manifest:full-path="Pictures/100000010000019E000000DBF58945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079" officeooo:paragraph-rsid="00031079"/>
    </style:style>
    <style:style style:name="P2" style:family="paragraph" style:parent-style-name="Standard">
      <style:paragraph-properties fo:break-before="page"/>
      <style:text-properties officeooo:rsid="00031079" officeooo:paragraph-rsid="000310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width="10.954cm" svg:height="5.794cm" draw:z-index="0"><draw:image xlink:href="Pictures/100000010000019E000000DBF58945DE.png" xlink:type="simple" xlink:show="embed" xlink:actuate="onLoad" draw:mime-type="image/png"/></draw:frame><draw:frame draw:style-name="fr2" draw:name="Imagen2" text:anchor-type="char" svg:x="5.687cm" svg:y="6.565cm" svg:width="5.821cm" svg:height="1.667cm" draw:z-index="1"><draw:image xlink:href="Pictures/10000001000000DC0000003FF040F5D0.png" xlink:type="simple" xlink:show="embed" xlink:actuate="onLoad" draw:mime-type="image/png"/></draw:frame><draw:frame draw:style-name="fr2" draw:name="Imagen3" text:anchor-type="char" svg:x="6.262cm" svg:y="8.634cm" svg:width="4.763cm" svg:height="1.879cm" draw:z-index="2"><draw:image xlink:href="Pictures/10000001000000B400000047E167C388.png" xlink:type="simple" xlink:show="embed" xlink:actuate="onLoad" draw:mime-type="image/png"/></draw:frame><draw:frame draw:style-name="fr2" draw:name="Imagen4" text:anchor-type="char" svg:x="0.31cm" svg:y="10.751cm" svg:width="5.556cm" svg:height="0.926cm" draw:z-index="3"><draw:image xlink:href="Pictures/10000001000000D2000000230F492B40.png" xlink:type="simple" xlink:show="embed" xlink:actuate="onLoad" draw:mime-type="image/png"/></draw:frame><draw:frame draw:style-name="fr2" draw:name="Imagen5" text:anchor-type="char" svg:x="8.909cm" svg:y="10.945cm" svg:width="7.699cm" svg:height="0.926cm" draw:z-index="4"><draw:image xlink:href="Pictures/1000000100000123000000239D2329B1.png" xlink:type="simple" xlink:show="embed" xlink:actuate="onLoad" draw:mime-type="image/png"/></draw:frame><draw:frame draw:style-name="fr2" draw:name="Imagen6" text:anchor-type="char" svg:x="0.312cm" svg:y="12.801cm" svg:width="17cm" svg:height="5.736cm" draw:z-index="5"><draw:image xlink:href="Pictures/1000000100000289000000DB8CFA08ED.png" xlink:type="simple" xlink:show="embed" xlink:actuate="onLoad" draw:mime-type="image/png"/></draw:frame><draw:frame draw:style-name="fr2" draw:name="Imagen7" text:anchor-type="char" svg:x="-0.12cm" svg:y="15.642cm" svg:width="17cm" svg:height="9.673cm" draw:z-index="6"><draw:image xlink:href="Pictures/1000000100000300000001B53A7F4EED.png" xlink:type="simple" xlink:show="embed" xlink:actuate="onLoad" draw:mime-type="image/png"/></draw:frame>A</text:p>
      <text:p text:style-name="P1"/>
      <text:p text:style-name="P1"/>
      <text:p text:style-name="P1"/>
      <text:p text:style-name="P2"><draw:frame draw:style-name="fr1" draw:name="Imagen8" text:anchor-type="char" svg:width="17cm" svg:height="9.019cm" draw:z-index="7"><draw:image xlink:href="Pictures/10000001000004BC000002834E1E4F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12:16:39.884896657</meta:creation-date>
    <dc:date>2026-05-18T12:29:14.848722335</dc:date>
    <meta:editing-duration>PT2M7S</meta:editing-duration>
    <meta:editing-cycles>1</meta:editing-cycles>
    <meta:document-statistic meta:table-count="0" meta:image-count="8" meta:object-count="0" meta:page-count="2" meta:paragraph-count="1" meta:word-count="1" meta:character-count="1" meta:non-whitespace-character-count="1"/>
    <meta:generator>LibreOffice/24.2.7.2$Linux_X86_64 LibreOffice_project/420$Build-2</meta:generator>
  </office:meta>
</office:document-meta>
</file>